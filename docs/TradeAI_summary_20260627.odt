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ream → TradeAI, step by step</text:h>
      <text:p text:style-name="Text_20_body"><text:span text:style-name="Strong_20_Emphasis">1. Dream Scan</text:span> <text:span text:style-name="Emphasis">(pure facts, no AI — your "ground truth" universe)</text:span><text:line-break/>Scans ~650-680 tickers via <text:span text:style-name="Source_20_Text">yfinance</text:span>, scores each 0-100 on: revenue growth, gross margin, RSI momentum, price trend vs MA50/52w-high, balance sheet (net cash/FCF), institutional ownership, market-cap bucket, insider buying + short float. Saves all of this to <text:span text:style-name="Source_20_Text">dream.json</text:span>. Manual-trigger only (per your last change).</text:p>
      <text:p text:style-name="Text_20_body"><text:span text:style-name="Strong_20_Emphasis">2. Macro Refresh</text:span> <text:span text:style-name="Emphasis">(separate, independent schedule — feeds step 4 later)</text:span><text:line-break/>Pulls FRED economic series (rates, CPI YoY, yield curve spread, etc.) + market headlines (NewsAPI or SPY/QQQ/GLD/TLT news fallback). Saved to <text:span text:style-name="Source_20_Text">macro.json</text:span>. Not triggered by the TradeAI pipeline itself — it's its own background refresh that TradeAI Analyze just reads from whenever it runs.</text:p>
      <text:p text:style-name="Text_20_body"><text:span text:style-name="Strong_20_Emphasis">3. TradeAI Identify</text:span> <text:span text:style-name="Emphasis">(selection — no new data fetched)</text:span><text:line-break/>Reads your current holdings + <text:span text:style-name="Source_20_Text">dream.json</text:span>. Always includes holdings ("evaluate for sell"). Then fills ~15 more slots across buckets like Momentum (RSI 45-70 + above MA50) and Reversal (oversold + decent Dream score), using only Dream's stored <text:span text:style-name="Source_20_Text">breakdown</text:span> fields. Output: a shortlist of tickers + bucket + reason.</text:p>
      <text:p text:style-name="Text_20_body"><text:span text:style-name="Strong_20_Emphasis">4. TradeAI Fetch</text:span> <text:span text:style-name="Emphasis">(fresh data pull, per shortlisted ticker only)</text:span><text:line-break/>For each identified ticker, re-fetches live <text:span text:style-name="Source_20_Text">yfinance</text:span> data: price, RSI14, MA20/50, Bollinger %B, price changes (1-30 day), revenue growth, gross margin, FCF, P/E, forward P/E, EPS, debt/equity, ROE, 52w high/low + % vs it, analyst target/upside/recommendation, institutional/insider %, short float, insider net buy/sell (90d), description. This is a fresh, richer snapshot than what's stored in Dream — not reused from it.</text:p>
      <text:p text:style-name="Text_20_body"><text:span text:style-name="Strong_20_Emphasis">5. TradeAI Analyze</text:span> <text:span text:style-name="Emphasis">(the only AI/Gemini call in the whole pipeline)</text:span><text:line-break/>Per ticker, builds a prompt containing:</text:p>
      <text:list text:style-name="L1">
        <text:list-item>
          <text:p text:style-name="P1">Company name + description </text:p>
        </text:list-item>
        <text:list-item>
          <text:p text:style-name="P1">The Fetch step's financials block (price, RSI, MA50, % changes, growth, margins, FCF, P/E, ROE, debt/equity, analyst target/rec, institutional %, 52w high) </text:p>
        </text:list-item>
        <text:list-item>
          <text:p text:style-name="P1">Up to 8 recent news headlines (last 7 days, ticker-specific) </text:p>
        </text:list-item>
        <text:list-item>
          <text:p text:style-name="P1"><text:span text:style-name="Strong_20_Emphasis">The full macro block from step 2</text:span> — every FRED indicator + up to 5 market headlines </text:p>
        </text:list-item>
        <text:list-item>
          <text:p text:style-name="P2">Asks Gemini to return: stage, trajectory, sentiment, 0-100 AI score, buy signal, reasoning, next-day forecast reason. 20-second pacing between calls for Gemini's free-tier rate limit. </text:p>
        </text:list-item>
      </text:list>
      <text:p text:style-name="Text_20_body"><text:span text:style-name="Strong_20_Emphasis">6. TradeAI Recommend</text:span> <text:span text:style-name="Emphasis">(rules-based composite — no AI call, checked just now)</text:span><text:line-break/>Combines, per ticker: <text:span text:style-name="Source_20_Text">Dream score + AI score + buy-signal score</text:span> (bucket-weighted) as a 70%-scaled base, then adds/subtracts bonuses — trajectory, stage, volume surge, analyst upside, news sentiment, a "breakout" pattern score (RSI turning up, BB squeeze, short-squeeze potential, volume building), sector-diversity penalty (avoids over-concentrating in a sector you already hold), and a signal-forecast boost (if today's separate price-forecast tool predicts meaningful upside/downside). That composite 0-100 score drives a simple paper-trading simulator: stop-loss/trailing-stop checks first, then sells anything scoring below threshold or AI-flagged "Avoid" or pushed out of the top 5, then buys the highest-composite qualifiers up to your slot/budget config.</text:p>
      <text:p text:style-name="Text_20_body"><text:soft-page-break/>So the full chain is: <text:span text:style-name="Strong_20_Emphasis">Dream (facts) → Identify (shortlist from Dream) → Fetch (fresh richer facts) → Analyze (facts + news + macro → Gemini → AI score) → Recommend (Dream + AI + bonuses → composite → simulated buy/sell)</text:span>. Macro only enters at step 5, sourced independently from FRED/headlines in step 2 — confirmed, you were right that I'd undersold it the first time by not tracing it back to its actual sour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7T22:56:31.647474400</meta:creation-date>
    <dc:date>2026-06-27T22:56:53.200212900</dc:date>
    <meta:editing-duration>PT23S</meta:editing-duration>
    <meta:editing-cycles>1</meta:editing-cycles>
    <meta:document-statistic meta:table-count="0" meta:image-count="0" meta:object-count="0" meta:page-count="2" meta:paragraph-count="13" meta:word-count="524" meta:character-count="3483" meta:non-whitespace-character-count="2963"/>
    <meta:generator>LibreOffice/26.2.4.2$Windows_X86_64 LibreOffice_project/0229ac93fcf0d7cbc6376066c6f35021cef002dc</meta:generator>
  </office:meta>
</office:document-meta>
</file>
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261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plates/</text:p>
      <text:p text:style-name="P1">├── index_v20260628_02.html <text:tab/>← Flask serves this (no changes to app.py needed)</text:p>
      <text:p text:style-name="P1">└── tabs/</text:p>
      <text:p text:style-name="P1">├── shared_js.html <text:tab/><text:tab/><text:tab/>← tooltips, fmt(), showTab, news, watchlist renderers</text:p>
      <text:p text:style-name="P1">├── watchlist_tab.html <text:tab/><text:tab/>← loadData, pollStatus, ticker detail, log panel, bank guide</text:p>
      <text:p text:style-name="P1">├── macro_tab.html <text:tab/><text:tab/>← loadMacro</text:p>
      <text:p text:style-name="P1">├── dream_tab.html <text:tab/><text:tab/>← loadDream</text:p>
      <text:p text:style-name="P1">├── admin_tab.html <text:tab/><text:tab/>← stub (renderAdmin lives in watchlist_tab)</text:p>
      <text:p text:style-name="P1">├── tradeai_tab.html <text:tab/><text:tab/>← loadTradeAI, trade sim, modals, market alert, report</text:p>
      <text:p text:style-name="P1">├── backtest_tab.html <text:tab/><text:tab/>← loadBacktest</text:p>
      <text:p text:style-name="P1">└── signal_tab.html <text:tab/><text:tab/><text:tab/>← loadSignal, scoring matrix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8T21:39:26.677122700</meta:creation-date>
    <dc:date>2026-06-28T22:49:58.076038900</dc:date>
    <meta:editing-duration>PT1H17S</meta:editing-duration>
    <meta:editing-cycles>1</meta:editing-cycles>
    <meta:document-statistic meta:table-count="0" meta:image-count="0" meta:object-count="0" meta:page-count="1" meta:paragraph-count="11" meta:word-count="70" meta:character-count="552" meta:non-whitespace-character-count="473"/>
    <meta:generator>LibreOffice/26.2.4.2$Windows_X86_64 LibreOffice_project/0229ac93fcf0d7cbc6376066c6f35021cef002dc</meta:generator>
  </office:meta>
</office:document-meta>
</file>
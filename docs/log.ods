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number-columns-repeated="2" office:value-type="string" calcext:value-type="string">
            <text:p>Claude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urn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5T23:17:50.833451200</meta:creation-date>
    <dc:date>2026-06-05T23:19:59.440569400</dc:date>
    <meta:editing-duration>PT2M9S</meta:editing-duration>
    <meta:editing-cycles>1</meta:editing-cycles>
    <meta:document-statistic meta:table-count="1" meta:cell-count="5" meta:object-count="0"/>
    <meta:generator>LibreOffice/26.2.3.2$Windows_X86_64 LibreOffice_project/70e089b17412e4cb7773e41413306b17a2328c34</meta:generator>
  </office:meta>
</office:document-meta>
</file>
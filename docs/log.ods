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8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0.445cm"/>
    </style:style>
    <style:style style:name="co4" style:family="table-column">
      <style:table-column-properties fo:break-before="auto" style:column-width="11.0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81d41a" fo:border="0.74pt solid 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5" table:number-columns-repeated="2" table:default-cell-style-name="ce1"/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Claude</text:p>
          </table:table-cell>
          <table:covered-table-cell table:number-columns-repeated="3" table:style-name="ce1"/>
          <table:table-cell/>
          <table:table-cell table:style-name="Default"/>
          <table:table-cell table:style-name="ce3" office:value-type="string" calcext:value-type="string" table:number-columns-spanned="4" table:number-rows-spanned="1">
            <text:p>2026-2027</text:p>
          </table:table-cell>
          <table:covered-table-cell table:number-columns-repeated="3"/>
        </table:table-row>
        <table:table-row table:style-name="ro1">
          <table:table-cell table:style-name="ce1"/>
          <table:table-cell table:style-name="ce4" office:value-type="string" calcext:value-type="string">
            <text:p>Game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ideal</text:p>
          </table:table-cell>
          <table:table-cell table:style-name="ce4" office:value-type="string" calcext:value-type="string">
            <text:p>dra</text:p>
          </table:table-cell>
          <table:table-cell/>
          <table:table-cell table:style-name="ce2" office:value-type="string" calcext:value-type="string">
            <text:p>Course</text:p>
          </table:table-cell>
          <table:table-cell office:value-type="string" calcext:value-type="string">
            <text:p>1A</text:p>
          </table:table-cell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Stock</text:p>
          </table:table-cell>
          <table:table-cell table:style-name="ce4"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CE105-Classic Mechanics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Randall D. Knight 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Robot dog</text:p>
          </table:table-cell>
          <table:table-cell table:style-name="ce1"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CE150-Fundamentals of Programming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aspberry</text:p>
          </table:table-cell>
          <table:table-cell table:style-name="ce1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CE190-Engineering Profession and Practic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 Language</text:p>
          </table:table-cell>
          <table:table-cell table:style-name="ce1"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MATH115-Linear Algebra for Engineering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yhton</text:p>
          </table:table-cell>
          <table:table-cell table:style-name="ce1"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MATH117-Calculus 1 for Engineering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iscreet Math</text:p>
          </table:table-cell>
          <table:table-cell table:style-name="ce1"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ECE198-Project Studio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ew browser</text:p>
          </table:table-cell>
          <table:table-cell table:style-name="ce1"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ENGL192/COMMST192-Communication in the Engilish Professio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ew Email Client</text:p>
          </table:table-cell>
          <table:table-cell table:style-name="ce1" table:number-columns-repeated="4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Portal – IdealAppHub</text:p>
          </table:table-cell>
          <table:table-cell table:style-name="ce1" table:number-columns-repeated="4"/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Default"/>
          <table:table-cell table:style-name="ce3" office:value-type="string" calcext:value-type="string" table:number-columns-spanned="4" table:number-rows-spanned="1">
            <text:p>2026-2027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Course</text:p>
          </table:table-cell>
          <table:table-cell office:value-type="string" calcext:value-type="string">
            <text:p>1B</text:p>
          </table:table-cell>
          <table:table-cell table:style-name="ce4"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CE102-Information Session</text:p>
          </table:table-cell>
          <table:table-cell office:value-type="string" calcext:value-type="string">
            <text:p>x</text:p>
          </table:table-cell>
          <table:table-cell table:style-name="ce4"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 table:number-columns-repeated="7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8">0000-00-00</text:date>, <text:time style:data-style-name="N2" text:time-value="09:27:23.47405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5T23:17:50.833451200</meta:creation-date>
    <dc:date>2026-06-08T23:02:28.587380100</dc:date>
    <meta:editing-duration>PT14H30M28S</meta:editing-duration>
    <meta:editing-cycles>3</meta:editing-cycles>
    <meta:generator>LibreOffice/26.2.3.2$Windows_X86_64 LibreOffice_project/70e089b17412e4cb7773e41413306b17a2328c34</meta:generator>
    <meta:document-statistic meta:table-count="1" meta:cell-count="50" meta:object-count="0"/>
  </office:meta>
</office:document-meta>
</file>